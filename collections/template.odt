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2f39" officeooo:paragraph-rsid="001c2f39"/>
    </style:style>
    <style:style style:name="P2" style:family="paragraph" style:parent-style-name="Preformatted_20_Text">
      <style:paragraph-properties style:writing-mode="lr-tb"/>
      <style:text-properties fo:font-size="12pt" style:font-size-asian="12pt" style:font-size-complex="12pt"/>
    </style:style>
    <style:style style:name="T1" style:family="text">
      <style:text-properties officeooo:rsid="001c2f3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2f3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Log</text:span><text:span text:style-name="T2"> Functions</text:span></text:p>
      <text:p text:style-name="Preformatted_20_Text">log2() - 2 base log2</text:p>
      <text:p text:style-name="Preformatted_20_Text">log10() - 10 base log</text:p>
      <text:p text:style-name="P1">log() - natural log e based</text:p>
      <text:p text:style-name="P1">// log(2.71828) returns value near 1</text:p>
      <text:p text:style-name="P1">**log3(num) doesn’t exist but value can be determined (log2(num)/log2(3))</text:p>
      <text:p text:style-name="P1"/>
      <text:p text:style-name="P1"/>
      <text:p text:style-name="P1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1T18:13:39.182924482</dc:date>
    <meta:editing-duration>PT56S</meta:editing-duration>
    <meta:editing-cycles>1</meta:editing-cycles>
    <meta:document-statistic meta:table-count="0" meta:image-count="0" meta:object-count="0" meta:page-count="1" meta:paragraph-count="6" meta:word-count="33" meta:character-count="190" meta:non-whitespace-character-count="163"/>
    <meta:generator>LibreOffice/7.3.7.2$Linux_X86_64 LibreOffice_project/30$Build-2</meta:generator>
  </office:meta>
</office:document-meta>
</file>